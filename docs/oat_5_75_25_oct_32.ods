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29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42"/>
  </office:automatic-styles>
  <office:body>
    <office:spreadsheet>
      <table:calculation-settings table:automatic-find-labels="false" table:use-regular-expressions="false" table:use-wildcards="true"/>
      <table:table table:name="OAT 5,75% 25 OCT 32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AT 5,75 % 25 octobre 2032</text:p>
          </table:table-cell>
          <table:table-cell table:number-columns-repeated="4"/>
          <table:table-cell office:value-type="string" calcext:value-type="string">
            <text:p>date achat</text:p>
          </table:table-cell>
          <table:table-cell table:style-name="ce1" office:value-type="date" office:date-value="2026-06-05" calcext:value-type="date">
            <text:p>2026-06-05</text:p>
          </table:table-cell>
          <table:table-cell/>
          <table:table-cell office:value-type="string" calcext:value-type="string">
            <text:p>Lien MOT</text:p>
          </table:table-cell>
          <table:table-cell office:value-type="string" calcext:value-type="string">
            <text:p><text:a xlink:href="https://live.euronext.com/en/product/bonds/fr0000187635-motx" xlink:type="simple">https://live.euronext.com/en/product/bonds/fr0000187635-motx</text:a>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strument</text:p>
          </table:table-cell>
          <table:table-cell table:style-name="ce2" office:value-type="string" calcext:value-type="string">
            <text:p>FR0000187635</text:p>
          </table:table-cell>
          <table:table-cell table:number-columns-repeated="4"/>
          <table:table-cell office:value-type="string" calcext:value-type="string">
            <text:p>date valeur</text:p>
          </table:table-cell>
          <table:table-cell table:style-name="ce1" office:value-type="date" office:date-value="2026-06-09" calcext:value-type="date">
            <text:p>2026-06-09</text:p>
          </table:table-cell>
          <table:table-cell office:value-type="string" calcext:value-type="string">
            <text:p>jours</text:p>
          </table:table-cell>
          <table:table-cell office:value-type="string" calcext:value-type="string">
            <text:p>coupon couru</text:p>
          </table:table-cell>
          <table:table-cell office:value-type="string" calcext:value-type="string">
            <text:p>taux courtag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en</text:p>
          </table:table-cell>
          <table:table-cell table:style-name="Default" office:value-type="string" calcext:value-type="string">
            <text:p><text:a xlink:href="https://www.aft.gouv.fr/fr/titre/fr0000187635" xlink:type="simple">https://www.aft.gouv.fr/fr/titre/fr0000187635</text:a></text:p>
          </table:table-cell>
          <table:table-cell table:number-columns-repeated="4"/>
          <table:table-cell office:value-type="string" calcext:value-type="string">
            <text:p>date pied</text:p>
          </table:table-cell>
          <table:table-cell table:style-name="ce1" office:value-type="date" office:date-value="2025-10-25" calcext:value-type="date">
            <text:p>2025-10-25</text:p>
          </table:table-cell>
          <table:table-cell table:formula="of:=[.H2]-[.H3]" office:value-type="float" office:value="227" calcext:value-type="float">
            <text:p>227</text:p>
          </table:table-cell>
          <table:table-cell table:style-name="ce7" table:formula="of:=[.$B$4]*[.I3]/365" office:value-type="percentage" office:value="0.0357602739726027" calcext:value-type="percentage">
            <text:p>3.57603%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upon %</text:p>
          </table:table-cell>
          <table:table-cell table:style-name="ce3" office:value-type="percentage" office:value="0.0575" calcext:value-type="percentage">
            <text:p>5.75%</text:p>
          </table:table-cell>
          <table:table-cell table:number-columns-repeated="4"/>
          <table:table-cell office:value-type="string" calcext:value-type="string">
            <text:p>cours</text:p>
          </table:table-cell>
          <table:table-cell table:style-name="ce3" office:value-type="percentage" office:value="1.1388" calcext:value-type="percentage">
            <text:p>113.88%</text:p>
          </table:table-cell>
          <table:table-cell office:value-type="string" calcext:value-type="string">
            <text:p>(Euronext 05/06/26, cours de clôture au MOT)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office:value-type="string" calcext:value-type="string">
            <text:p>nominal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4"/>
          <table:table-cell office:value-type="string" calcext:value-type="string">
            <text:p>qté</text:p>
          </table:table-cell>
          <table:table-cell office:value-type="float" office:value="8497" calcext:value-type="float">
            <text:p>8497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prix brut</text:p>
          </table:table-cell>
          <table:table-cell table:style-name="ce4" table:formula="of:=ROUND([.H5]*[.H4]*[.$B$5];2)" office:value-type="currency" office:currency="EUR" office:value="9676.38" calcext:value-type="currency">
            <text:p>9,676.38 €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coupon couru</text:p>
          </table:table-cell>
          <table:table-cell table:style-name="ce4" table:formula="of:=ROUND([.J3]*[.H5]*[.$B$5];2)" office:value-type="currency" office:currency="EUR" office:value="303.86" calcext:value-type="currency">
            <text:p>303.86 €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courtage</text:p>
          </table:table-cell>
          <table:table-cell table:style-name="ce4" table:formula="of:=ROUND([.K3]*[.H6];2)" office:value-type="currency" office:currency="EUR" office:value="19.35" calcext:value-type="currency">
            <text:p>19.35 €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total op</text:p>
          </table:table-cell>
          <table:table-cell table:style-name="ce4" table:formula="of:=[.H6]+[.H7]+[.H8]" office:value-type="currency" office:currency="EUR" office:value="9999.59" calcext:value-type="currency">
            <text:p>9,999.59 €</text:p>
          </table:table-cell>
          <table:table-cell office:value-type="string" calcext:value-type="string">
            <text:p>coupon</text:p>
          </table:table-cell>
          <table:table-cell table:style-name="ce4" table:formula="of:=ROUND([.$B$4]*[.$B$5]*[.H5];2)" office:value-type="currency" office:currency="EUR" office:value="488.58" calcext:value-type="currency">
            <text:p>488.58 €</text:p>
          </table:table-cell>
          <table:table-cell table:style-name="ce4"/>
          <table:table-cell office:value-type="string" calcext:value-type="string">
            <text:p>Prime d’émission</text:p>
          </table:table-cell>
          <table:table-cell table:style-name="ce4" table:formula="of:=[.H9]-[.H5]*[.B5]" office:value-type="currency" office:currency="EUR" office:value="1502.59" calcext:value-type="currency">
            <text:p>1,502.59 €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4"/>
          <table:table-cell office:value-type="string" calcext:value-type="string">
            <text:p>yield to price</text:p>
          </table:table-cell>
          <table:table-cell table:style-name="ce5" table:formula="of:=[.J9]/[.H9]" office:value-type="percentage" office:value="0.0488600032601337" calcext:value-type="percentage">
            <text:p>4.89%</text:p>
          </table:table-cell>
          <table:table-cell/>
          <table:table-cell office:value-type="string" calcext:value-type="string">
            <text:p>Somme Coupons</text:p>
          </table:table-cell>
          <table:table-cell table:style-name="ce4" table:formula="of:=7*[.J9]" office:value-type="currency" office:currency="EUR" office:value="3420.06" calcext:value-type="currency">
            <text:p>3,420.06 €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Assiette nette</text:p>
          </table:table-cell>
          <table:table-cell office:value-type="string" calcext:value-type="string">
            <text:p>Assiette comptabilité caisse</text:p>
          </table:table-cell>
          <table:table-cell table:number-columns-repeated="6"/>
          <table:table-cell office:value-type="string" calcext:value-type="string">
            <text:p>Encaissements</text:p>
          </table:table-cell>
          <table:table-cell table:style-name="ce4" table:formula="of:=[.M10]+[.H5]*[.$B$5]" office:value-type="currency" office:currency="EUR" office:value="11917.06" calcext:value-type="currency">
            <text:p>11,917.06 €</text:p>
          </table:table-cell>
        </table:table-row>
        <table:table-row table:style-name="ro1">
          <table:table-cell table:formula="of:=[.$H$1]" office:value-type="date" office:date-value="2026-06-05" calcext:value-type="date">
            <text:p>2026-06-05</text:p>
          </table:table-cell>
          <table:table-cell table:formula="of:=-[.$H$9]" office:value-type="currency" office:currency="EUR" office:value="-9999.59" calcext:value-type="currency">
            <text:p>-9,999.59 €</text:p>
          </table:table-cell>
          <table:table-cell table:style-name="ce5" table:formula="of:=XIRR([.B12:.B20];[.A12:.A20])" office:value-type="percentage" office:value="0.0325117076667157" calcext:value-type="percentage">
            <text:p>3.25%</text:p>
          </table:table-cell>
          <table:table-cell table:number-columns-repeated="10"/>
        </table:table-row>
        <table:table-row table:style-name="ro1">
          <table:table-cell office:value-type="date" office:date-value="2026-10-25" calcext:value-type="date">
            <text:p>2026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/>
          <table:table-cell table:style-name="ce4" table:formula="of:=[.B13]" office:value-type="currency" office:currency="EUR" office:value="488.58" calcext:value-type="currency">
            <text:p>488.58 €</text:p>
          </table:table-cell>
          <table:table-cell table:style-name="ce4" table:formula="of:=MAX(0; [.D13])" office:value-type="currency" office:currency="EUR" office:value="488.58" calcext:value-type="currency">
            <text:p>488.58 €</text:p>
          </table:table-cell>
          <table:table-cell table:number-columns-repeated="8"/>
        </table:table-row>
        <table:table-row table:style-name="ro1">
          <table:table-cell table:formula="of:=DATE(YEAR([.A13])+1; 10; 25)" office:value-type="date" office:date-value="2027-10-25" calcext:value-type="date">
            <text:p>2027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/>
          <table:table-cell table:style-name="ce4" table:formula="of:=[.B14]" office:value-type="currency" office:currency="EUR" office:value="488.58" calcext:value-type="currency">
            <text:p>488.58 €</text:p>
          </table:table-cell>
          <table:table-cell table:style-name="ce4" table:formula="of:=MAX(0; [.D14])" office:value-type="currency" office:currency="EUR" office:value="488.58" calcext:value-type="currency">
            <text:p>488.58 €</text:p>
          </table:table-cell>
          <table:table-cell table:number-columns-repeated="8"/>
        </table:table-row>
        <table:table-row table:style-name="ro1">
          <table:table-cell table:formula="of:=DATE(YEAR([.A14])+1; 10; 25)" office:value-type="date" office:date-value="2028-10-25" calcext:value-type="date">
            <text:p>2028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/>
          <table:table-cell table:style-name="ce4" table:formula="of:=[.B15]" office:value-type="currency" office:currency="EUR" office:value="488.58" calcext:value-type="currency">
            <text:p>488.58 €</text:p>
          </table:table-cell>
          <table:table-cell table:style-name="ce4" table:formula="of:=MAX(0; [.D15])" office:value-type="currency" office:currency="EUR" office:value="488.58" calcext:value-type="currency">
            <text:p>488.58 €</text:p>
          </table:table-cell>
          <table:table-cell table:number-columns-repeated="8"/>
        </table:table-row>
        <table:table-row table:style-name="ro1">
          <table:table-cell table:formula="of:=DATE(YEAR([.A15])+1; 10; 25)" office:value-type="date" office:date-value="2029-10-25" calcext:value-type="date">
            <text:p>2029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/>
          <table:table-cell table:style-name="ce4" table:formula="of:=[.B16]" office:value-type="currency" office:currency="EUR" office:value="488.58" calcext:value-type="currency">
            <text:p>488.58 €</text:p>
          </table:table-cell>
          <table:table-cell table:style-name="ce4" table:formula="of:=MAX(0; [.D16])" office:value-type="currency" office:currency="EUR" office:value="488.58" calcext:value-type="currency">
            <text:p>488.58 €</text:p>
          </table:table-cell>
          <table:table-cell table:number-columns-repeated="8"/>
        </table:table-row>
        <table:table-row table:style-name="ro1">
          <table:table-cell table:formula="of:=DATE(YEAR([.A16])+1; 10; 25)" office:value-type="date" office:date-value="2030-10-25" calcext:value-type="date">
            <text:p>2030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/>
          <table:table-cell table:style-name="ce4" table:formula="of:=[.B17]" office:value-type="currency" office:currency="EUR" office:value="488.58" calcext:value-type="currency">
            <text:p>488.58 €</text:p>
          </table:table-cell>
          <table:table-cell table:style-name="ce4" table:formula="of:=MAX(0; [.D17])" office:value-type="currency" office:currency="EUR" office:value="488.58" calcext:value-type="currency">
            <text:p>488.58 €</text:p>
          </table:table-cell>
          <table:table-cell table:number-columns-repeated="8"/>
        </table:table-row>
        <table:table-row table:style-name="ro1">
          <table:table-cell table:formula="of:=DATE(YEAR([.A17])+1; 10; 25)" office:value-type="date" office:date-value="2031-10-25" calcext:value-type="date">
            <text:p>2031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/>
          <table:table-cell table:style-name="ce4" table:formula="of:=[.B18]" office:value-type="currency" office:currency="EUR" office:value="488.58" calcext:value-type="currency">
            <text:p>488.58 €</text:p>
          </table:table-cell>
          <table:table-cell table:style-name="ce4" table:formula="of:=MAX(0; [.D18])" office:value-type="currency" office:currency="EUR" office:value="488.58" calcext:value-type="currency">
            <text:p>488.58 €</text:p>
          </table:table-cell>
          <table:table-cell table:number-columns-repeated="8"/>
        </table:table-row>
        <table:table-row table:style-name="ro1">
          <table:table-cell table:formula="of:=DATE(YEAR([.A18])+1; 10; 25)" office:value-type="date" office:date-value="2032-10-25" calcext:value-type="date">
            <text:p>2032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/>
          <table:table-cell table:style-name="ce4" table:formula="of:=[.B19]" office:value-type="currency" office:currency="EUR" office:value="488.58" calcext:value-type="currency">
            <text:p>488.58 €</text:p>
          </table:table-cell>
          <table:table-cell table:style-name="ce4" table:formula="of:=MAX(0; [.D19])" office:value-type="currency" office:currency="EUR" office:value="488.58" calcext:value-type="currency">
            <text:p>488.58 €</text:p>
          </table:table-cell>
          <table:table-cell table:number-columns-repeated="8"/>
        </table:table-row>
        <table:table-row table:style-name="ro1">
          <table:table-cell office:value-type="date" office:date-value="2032-10-25" calcext:value-type="date">
            <text:p>2032-10-25</text:p>
          </table:table-cell>
          <table:table-cell table:formula="of:=[.$H$5]*[.$B$5]" office:value-type="currency" office:currency="EUR" office:value="8497" calcext:value-type="currency">
            <text:p>8,497.00 €</text:p>
          </table:table-cell>
          <table:table-cell/>
          <table:table-cell table:style-name="ce4" table:formula="of:=[.B20]+[.B12]" office:value-type="currency" office:currency="EUR" office:value="-1502.59" calcext:value-type="currency">
            <text:p>-1,502.59 €</text:p>
          </table:table-cell>
          <table:table-cell table:style-name="ce4" office:value-type="currency" office:currency="EUR" office:value="-488.29" calcext:value-type="currency">
            <text:p>-488.29 €</text:p>
          </table:table-cell>
          <table:table-cell office:value-type="string" calcext:value-type="string">
            <text:p>prime négative non compensable sauf avec le dernier coupon BOI-RPPM-RCM-20-10-20-20 pt. 39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Enrichissement</text:p>
          </table:table-cell>
          <table:table-cell table:formula="of:=SUM([.B12:.B20])" office:value-type="currency" office:currency="EUR" office:value="1917.47" calcext:value-type="currency">
            <text:p>1,917.47 €</text:p>
          </table:table-cell>
          <table:table-cell/>
          <table:table-cell office:value-type="string" calcext:value-type="string">
            <text:p>Total taxable</text:p>
          </table:table-cell>
          <table:table-cell table:style-name="ce4" table:formula="of:=SUM([.E13:.E20])" office:value-type="currency" office:currency="EUR" office:value="2931.77" calcext:value-type="currency">
            <text:p>2,931.77 €</text:p>
          </table:table-cell>
          <table:table-cell table:style-name="ce6" office:value-type="string" calcext:value-type="string">
            <text:p>/!\ /!\ /!\ /!\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Taux actuariel</text:p>
          </table:table-cell>
          <table:table-cell table:style-name="ce5" table:formula="of:=XIRR([.B27:.B35];[.A27:.A35])" office:value-type="percentage" office:value="0.0325117076667157" calcext:value-type="percentage">
            <text:p>3.25%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Part intérêts</text:p>
          </table:table-cell>
          <table:table-cell office:value-type="string" calcext:value-type="string">
            <text:p>Part capital</text:p>
          </table:table-cell>
          <table:table-cell office:value-type="string" calcext:value-type="string">
            <text:p>CRD</text:p>
          </table:table-cell>
          <table:table-cell table:number-columns-repeated="8"/>
        </table:table-row>
        <table:table-row table:style-name="ro1">
          <table:table-cell table:formula="of:=[.$H$1]" office:value-type="date" office:date-value="2026-06-05" calcext:value-type="date">
            <text:p>2026-06-05</text:p>
          </table:table-cell>
          <table:table-cell table:formula="of:=-[.$H$9]" office:value-type="currency" office:currency="EUR" office:value="-9999.59" calcext:value-type="currency">
            <text:p>-9,999.59 €</text:p>
          </table:table-cell>
          <table:table-cell/>
          <table:table-cell table:style-name="ce4" table:formula="of:=[.B27]-[.C27]" office:value-type="currency" office:currency="EUR" office:value="-9999.59" calcext:value-type="currency">
            <text:p>-9,999.59 €</text:p>
          </table:table-cell>
          <table:table-cell table:style-name="ce4" table:formula="of:=[.B27]" office:value-type="currency" office:currency="EUR" office:value="-9999.59" calcext:value-type="currency">
            <text:p>-9,999.59 €</text:p>
          </table:table-cell>
          <table:table-cell table:number-columns-repeated="8"/>
        </table:table-row>
        <table:table-row table:style-name="ro1">
          <table:table-cell office:value-type="date" office:date-value="2026-10-25" calcext:value-type="date">
            <text:p>2026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 table:style-name="ce4" table:formula="of:=ROUND(-[.E27]*((1+[.$B$25])^(([.A28]-[.A27])/365)-1);2)" office:value-type="currency" office:currency="EUR" office:value="125.24" calcext:value-type="currency">
            <text:p>125.24 €</text:p>
          </table:table-cell>
          <table:table-cell table:style-name="ce4" table:formula="of:=[.B28]-[.C28]" office:value-type="currency" office:currency="EUR" office:value="363.34" calcext:value-type="currency">
            <text:p>363.34 €</text:p>
          </table:table-cell>
          <table:table-cell table:style-name="ce4" table:formula="of:=[.E27]+[.D28]" office:value-type="currency" office:currency="EUR" office:value="-9636.25" calcext:value-type="currency">
            <text:p>-9,636.25 €</text:p>
          </table:table-cell>
          <table:table-cell table:number-columns-repeated="8"/>
        </table:table-row>
        <table:table-row table:style-name="ro1">
          <table:table-cell table:formula="of:=DATE(YEAR([.A28])+1; 10; 25)" office:value-type="date" office:date-value="2027-10-25" calcext:value-type="date">
            <text:p>2027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 table:style-name="ce4" table:formula="of:=ROUND(-[.E28]*((1+[.$B$25])^(([.A29]-[.A28])/365)-1);2)" office:value-type="currency" office:currency="EUR" office:value="313.29" calcext:value-type="currency">
            <text:p>313.29 €</text:p>
          </table:table-cell>
          <table:table-cell table:style-name="ce4" table:formula="of:=[.B29]-[.C29]" office:value-type="currency" office:currency="EUR" office:value="175.29" calcext:value-type="currency">
            <text:p>175.29 €</text:p>
          </table:table-cell>
          <table:table-cell table:style-name="ce4" table:formula="of:=[.E28]+[.D29]" office:value-type="currency" office:currency="EUR" office:value="-9460.96" calcext:value-type="currency">
            <text:p>-9,460.96 €</text:p>
          </table:table-cell>
          <table:table-cell table:number-columns-repeated="8"/>
        </table:table-row>
        <table:table-row table:style-name="ro1">
          <table:table-cell table:formula="of:=DATE(YEAR([.A29])+1; 10; 25)" office:value-type="date" office:date-value="2028-10-25" calcext:value-type="date">
            <text:p>2028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 table:style-name="ce4" table:formula="of:=ROUND(-[.E29]*((1+[.$B$25])^(([.A30]-[.A29])/365)-1);2)" office:value-type="currency" office:currency="EUR" office:value="308.45" calcext:value-type="currency">
            <text:p>308.45 €</text:p>
          </table:table-cell>
          <table:table-cell table:style-name="ce4" table:formula="of:=[.B30]-[.C30]" office:value-type="currency" office:currency="EUR" office:value="180.13" calcext:value-type="currency">
            <text:p>180.13 €</text:p>
          </table:table-cell>
          <table:table-cell table:style-name="ce4" table:formula="of:=[.E29]+[.D30]" office:value-type="currency" office:currency="EUR" office:value="-9280.83" calcext:value-type="currency">
            <text:p>-9,280.83 €</text:p>
          </table:table-cell>
          <table:table-cell table:number-columns-repeated="8"/>
        </table:table-row>
        <table:table-row table:style-name="ro1">
          <table:table-cell table:formula="of:=DATE(YEAR([.A30])+1; 10; 25)" office:value-type="date" office:date-value="2029-10-25" calcext:value-type="date">
            <text:p>2029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 table:style-name="ce4" table:formula="of:=ROUND(-[.E30]*((1+[.$B$25])^(([.A31]-[.A30])/365)-1);2)" office:value-type="currency" office:currency="EUR" office:value="301.74" calcext:value-type="currency">
            <text:p>301.74 €</text:p>
          </table:table-cell>
          <table:table-cell table:style-name="ce4" table:formula="of:=[.B31]-[.C31]" office:value-type="currency" office:currency="EUR" office:value="186.84" calcext:value-type="currency">
            <text:p>186.84 €</text:p>
          </table:table-cell>
          <table:table-cell table:style-name="ce4" table:formula="of:=[.E30]+[.D31]" office:value-type="currency" office:currency="EUR" office:value="-9093.99" calcext:value-type="currency">
            <text:p>-9,093.99 €</text:p>
          </table:table-cell>
          <table:table-cell table:number-columns-repeated="8"/>
        </table:table-row>
        <table:table-row table:style-name="ro1">
          <table:table-cell table:formula="of:=DATE(YEAR([.A31])+1; 10; 25)" office:value-type="date" office:date-value="2030-10-25" calcext:value-type="date">
            <text:p>2030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 table:style-name="ce4" table:formula="of:=ROUND(-[.E31]*((1+[.$B$25])^(([.A32]-[.A31])/365)-1);2)" office:value-type="currency" office:currency="EUR" office:value="295.66" calcext:value-type="currency">
            <text:p>295.66 €</text:p>
          </table:table-cell>
          <table:table-cell table:style-name="ce4" table:formula="of:=[.B32]-[.C32]" office:value-type="currency" office:currency="EUR" office:value="192.92" calcext:value-type="currency">
            <text:p>192.92 €</text:p>
          </table:table-cell>
          <table:table-cell table:style-name="ce4" table:formula="of:=[.E31]+[.D32]" office:value-type="currency" office:currency="EUR" office:value="-8901.07" calcext:value-type="currency">
            <text:p>-8,901.07 €</text:p>
          </table:table-cell>
          <table:table-cell table:number-columns-repeated="8"/>
        </table:table-row>
        <table:table-row table:style-name="ro1">
          <table:table-cell table:formula="of:=DATE(YEAR([.A32])+1; 10; 25)" office:value-type="date" office:date-value="2031-10-25" calcext:value-type="date">
            <text:p>2031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 table:style-name="ce4" table:formula="of:=ROUND(-[.E32]*((1+[.$B$25])^(([.A33]-[.A32])/365)-1);2)" office:value-type="currency" office:currency="EUR" office:value="289.39" calcext:value-type="currency">
            <text:p>289.39 €</text:p>
          </table:table-cell>
          <table:table-cell table:style-name="ce4" table:formula="of:=[.B33]-[.C33]" office:value-type="currency" office:currency="EUR" office:value="199.19" calcext:value-type="currency">
            <text:p>199.19 €</text:p>
          </table:table-cell>
          <table:table-cell table:style-name="ce4" table:formula="of:=[.E32]+[.D33]" office:value-type="currency" office:currency="EUR" office:value="-8701.88" calcext:value-type="currency">
            <text:p>-8,701.88 €</text:p>
          </table:table-cell>
          <table:table-cell table:number-columns-repeated="8"/>
        </table:table-row>
        <table:table-row table:style-name="ro1">
          <table:table-cell table:formula="of:=DATE(YEAR([.A33])+1; 10; 25)" office:value-type="date" office:date-value="2032-10-25" calcext:value-type="date">
            <text:p>2032-10-25</text:p>
          </table:table-cell>
          <table:table-cell table:formula="of:=[.$J$9]" office:value-type="currency" office:currency="EUR" office:value="488.58" calcext:value-type="currency">
            <text:p>488.58 €</text:p>
          </table:table-cell>
          <table:table-cell table:style-name="ce4" table:formula="of:=ROUND(-[.E33]*((1+[.$B$25])^(([.A34]-[.A33])/365)-1);2)" office:value-type="currency" office:currency="EUR" office:value="283.7" calcext:value-type="currency">
            <text:p>283.70 €</text:p>
          </table:table-cell>
          <table:table-cell table:style-name="ce4" table:formula="of:=[.B34]-[.C34]" office:value-type="currency" office:currency="EUR" office:value="204.88" calcext:value-type="currency">
            <text:p>204.88 €</text:p>
          </table:table-cell>
          <table:table-cell table:style-name="ce4" table:formula="of:=[.E33]+[.D34]" office:value-type="currency" office:currency="EUR" office:value="-8497" calcext:value-type="currency">
            <text:p>-8,497.00 €</text:p>
          </table:table-cell>
          <table:table-cell table:number-columns-repeated="8"/>
        </table:table-row>
        <table:table-row table:style-name="ro1">
          <table:table-cell office:value-type="date" office:date-value="2032-10-25" calcext:value-type="date">
            <text:p>2032-10-25</text:p>
          </table:table-cell>
          <table:table-cell table:formula="of:=[.$H$5]*[.$B$5]" office:value-type="currency" office:currency="EUR" office:value="8497" calcext:value-type="currency">
            <text:p>8,497.00 €</text:p>
          </table:table-cell>
          <table:table-cell table:style-name="ce4" table:formula="of:=ROUND(-[.E34]*((1+[.$B$25])^(([.A35]-[.A34])/365)-1);2)" office:value-type="currency" office:currency="EUR" office:value="0" calcext:value-type="currency">
            <text:p>0.00 €</text:p>
          </table:table-cell>
          <table:table-cell table:style-name="ce4" table:formula="of:=[.B35]-[.C35]" office:value-type="currency" office:currency="EUR" office:value="8497" calcext:value-type="currency">
            <text:p>8,497.00 €</text:p>
          </table:table-cell>
          <table:table-cell table:style-name="ce4" table:formula="of:=[.E34]+[.D35]" office:value-type="currency" office:currency="EUR" office:value="0" calcext:value-type="currency">
            <text:p>0.00 €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Enrichissement net</text:p>
          </table:table-cell>
          <table:table-cell table:formula="of:=SUM([.B27:.B35])" office:value-type="currency" office:currency="EUR" office:value="1917.47" calcext:value-type="currency">
            <text:p>1,917.47 €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Total intérêts</text:p>
          </table:table-cell>
          <table:table-cell table:style-name="ce4" table:formula="of:=SUM([.C28:.C35])" office:value-type="currency" office:currency="EUR" office:value="1917.47" calcext:value-type="currency">
            <text:p>1,917.47 €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4">
      <number:number number:decimal-places="20" number:min-decimal-places="20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number:number-style style:name="N137">
      <number:number number:decimal-places="5" number:min-decimal-places="5" number:min-integer-digits="1" number:grouping="true"/>
    </number:number-style>
    <number:number-style style:name="N138">
      <number:number number:decimal-places="6" number:min-decimal-places="6" number:min-integer-digits="1" number:grouping="true"/>
    </number:number-style>
    <number:number-style style:name="N139">
      <number:number number:decimal-places="7" number:min-decimal-places="7" number:min-integer-digits="1" number:grouping="true"/>
    </number:number-style>
    <number:percentage-style style:name="N140">
      <number:number number:decimal-places="3" number:min-decimal-places="3" number:min-integer-digits="1"/>
      <number:text>%</number:text>
    </number:percentage-style>
    <number:percentage-style style:name="N141">
      <number:number number:decimal-places="4" number:min-decimal-places="4" number:min-integer-digits="1"/>
      <number:text>%</number:text>
    </number:percentage-style>
    <number:percentage-style style:name="N142">
      <number:number number:decimal-places="5" number:min-decimal-places="5" number:min-integer-digits="1"/>
      <number:text>%</number:text>
    </number:percentage-style>
    <number:currency-style style:name="N143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currency-style style:name="N144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percentage-style style:name="N145">
      <number:number number:decimal-places="6" number:min-decimal-places="6" number:min-integer-digits="1"/>
      <number:text>%</number:text>
    </number:percentage-style>
    <number:percentage-style style:name="N146">
      <number:number number:decimal-places="7" number:min-decimal-places="7" number:min-integer-digits="1"/>
      <number:text>%</number:text>
    </number:percentage-style>
    <number:currency-style style:name="N147P0" style:volatile="true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8P0"/>
    </number:currency-style>
    <number:number-style style:name="N149">
      <number:number number:decimal-places="5" number:min-decimal-places="5" number:min-integer-digits="1"/>
    </number:number-style>
    <number:number-style style:name="N150">
      <number:number number:decimal-places="4" number:min-decimal-places="4" number:min-integer-digits="1"/>
    </number:number-style>
    <number:number-style style:name="N151">
      <number:number number:decimal-places="15" number:min-decimal-places="15" number:min-integer-digits="1"/>
    </number:number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9P0"/>
    </number:currency-style>
    <number:currency-style style:name="N10130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1P0" style:volatile="true" number:language="en" number:country="US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131" number:language="en" number:country="U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131P0"/>
    </number:currency-style>
    <number:currency-style style:name="N10132P0" style:volatile="true" number:language="en" number:country="US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0132" number:language="en" number:country="U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0132P0"/>
    </number:currency-style>
    <number:currency-style style:name="N10133P0" style:volatile="true" number:language="en" number:country="US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en" number:country="US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4P0" style:volatile="true" number:language="en" number:country="US">
      <number:number number:decimal-places="6" number:min-decimal-places="6" number:min-integer-digits="1" number:grouping="true"/>
      <number:text> </number:text>
      <number:currency-symbol number:language="fr" number:country="FR">€</number:currency-symbol>
    </number:currency-style>
    <number:currency-style style:name="N10134" number:language="en" number:country="US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fr" number:country="FR">€</number:currency-symbol>
      <style:map style:condition="value()&gt;=0" style:apply-style-name="N1013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08:35:14.459501259</meta:creation-date>
    <dc:date>2026-06-07T09:07:54.570305028</dc:date>
    <meta:editing-duration>PT32M38S</meta:editing-duration>
    <meta:editing-cycles>5</meta:editing-cycles>
    <meta:generator>LibreOffice/25.2.3.2$Linux_X86_64 LibreOffice_project/520$Build-2</meta:generator>
    <meta:document-statistic meta:table-count="1" meta:cell-count="148" meta:object-count="0"/>
  </office:meta>
</office:document-meta>
</file>